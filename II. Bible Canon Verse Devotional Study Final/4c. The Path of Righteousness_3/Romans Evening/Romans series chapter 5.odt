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Romans 5 Series</text:span></text:p>
      <text:p text:style-name="P1"><text:span text:style-name="T1">Tema ng Chapter:</text:span></text:p>
      <text:p text:style-name="P1"><text:span text:style-name="T1"/></text:p>
      <text:p text:style-name="P1"><text:span text:style-name="T1">The Blessings of Justification: New Life Through Christ</text:span></text:p>
      <text:p text:style-name="P1"><text:span text:style-name="T1"/></text:p>
      <text:p text:style-name="P1"><text:span text:style-name="T1">Week 1: Romans 5:1</text:span><text:span text:style-name="T2">–5 — Peace and Hope Through Justification</text:span></text:p>
      <text:p text:style-name="P1"><text:span text:style-name="T2">Focus:</text:span></text:p>
      <text:p text:style-name="P1"><text:span text:style-name="T2"/></text:p>
      <text:p text:style-name="P1"><text:span text:style-name="T2">Dahil tayo ay inaring-ganap sa pamamagitan ng pananampalataya, mayroon na tayong kapayapaan sa Diyos at matibay na pag-asa.</text:span></text:p>
      <text:p text:style-name="P1"><text:span text:style-name="T2"/></text:p>
      <text:p text:style-name="P1"><text:span text:style-name="T2">Key Idea:</text:span></text:p>
      <text:p text:style-name="P1"><text:span text:style-name="T2"/></text:p>
      <text:p text:style-name="P1"><text:span text:style-name="T2">Ang justification ay nagdudulot ng kapayapaan, biyaya, at pag-asang hindi nabibigo.</text:span></text:p>
      <text:p text:style-name="P1"><text:span text:style-name="T2"/></text:p>
      <text:p text:style-name="P1"><text:span text:style-name="T2">Application:</text:span></text:p>
      <text:p text:style-name="P1"><text:span text:style-name="T2"/></text:p>
      <text:p text:style-name="P1"><text:span text:style-name="T2">Mamuhay nang may kapanatagan dahil ang ating relasyon sa Diyos ay naibalik na kay Cristo.</text:span></text:p>
      <text:p text:style-name="P1"><text:span text:style-name="T2"/></text:p>
      <text:p text:style-name="P1"><text:span text:style-name="T2">Posibleng 6-Day Breakdown:</text:span></text:p>
      <text:p text:style-name="P1"><text:span text:style-name="T2">Day 1 — Romans 5:1</text:span></text:p>
      <text:p text:style-name="P1"><text:span text:style-name="T2">Peace with God</text:span></text:p>
      <text:p text:style-name="P1"><text:span text:style-name="T2">Day 2 — Romans 5:2a</text:span></text:p>
      <text:p text:style-name="P1"><text:span text:style-name="T2">Standing Firm in God's Grace</text:span></text:p>
      <text:p text:style-name="P1"><text:span text:style-name="T2">Day 3 — Romans 5:2b</text:span></text:p>
      <text:p text:style-name="P1"><text:span text:style-name="T2">Rejoicing in the Hope of God's Glory</text:span></text:p>
      <text:p text:style-name="P1"><text:span text:style-name="T2">Day 4 — Romans 5:3</text:span></text:p>
      <text:p text:style-name="P1"><text:span text:style-name="T2">Rejoicing Even in Suffering</text:span></text:p>
      <text:p text:style-name="P1"><text:span text:style-name="T2">Day 5 — Romans 5:4</text:span></text:p>
      <text:p text:style-name="P1"><text:span text:style-name="T2">Perseverance Produces Character</text:span></text:p>
      <text:p text:style-name="P1"><text:span text:style-name="T2">Day 6 — Romans 5:5</text:span></text:p>
      <text:p text:style-name="P1"><text:span text:style-name="T2">Hope That Never Disappoints</text:span></text:p>
      <text:p text:style-name="P1"><text:span text:style-name="T2">Week 2: Romans 5:6–11 — Christ Died for the Ungodly</text:span></text:p>
      <text:p text:style-name="P1"><text:span text:style-name="T2">Focus:</text:span></text:p>
      <text:p text:style-name="P1"><text:span text:style-name="T2"/></text:p>
      <text:p text:style-name="P1"><text:span text:style-name="T2">Ipinakita ng Diyos ang Kanyang pag-ibig nang mamatay si Cristo para sa mga makasalanan.</text:span></text:p>
      <text:p text:style-name="P1"><text:span text:style-name="T2"/></text:p>
      <text:p text:style-name="P1"><text:span text:style-name="T2">Key Idea:</text:span></text:p>
      <text:p text:style-name="P1"><text:span text:style-name="T2"/></text:p>
      <text:p text:style-name="P1"><text:span text:style-name="T2">Ang pag-ibig ng Diyos ang dahilan ng ating kaligtasan, hindi ang ating pagiging karapat-dapat.</text:span></text:p>
      <text:p text:style-name="P1"><text:span text:style-name="T2"/></text:p>
      <text:p text:style-name="P1"><text:span text:style-name="T2">Application:</text:span></text:p>
      <text:p text:style-name="P1"><text:span text:style-name="T2"/></text:p>
      <text:p text:style-name="P1"><text:span text:style-name="T2">Magpasalamat sa biyaya ng Diyos at mamuhay bilang taong pinagkasundo na Niya sa Kanyang sarili.</text:span></text:p>
      <text:p text:style-name="P1"><text:span text:style-name="T2"/></text:p>
      <text:p text:style-name="P1"><text:span text:style-name="T2">Posibleng 6-Day Breakdown:</text:span></text:p>
      <text:p text:style-name="P1"><text:span text:style-name="T2">Day 1 — Romans 5:6</text:span></text:p>
      <text:p text:style-name="P1"><text:span text:style-name="T2">Christ Died for the Helpless</text:span></text:p>
      <text:p text:style-name="P1"><text:span text:style-name="T2">Day 2 — Romans 5:7</text:span></text:p>
      <text:p text:style-name="P1"><text:span text:style-name="T2">The Limits of Human Love</text:span></text:p>
      <text:p text:style-name="P1"><text:span text:style-name="T2">Day 3 — Romans 5:8</text:span></text:p>
      <text:p text:style-name="P1"><text:span text:style-name="T2">God Demonstrated His Love</text:span></text:p>
      <text:p text:style-name="P1"><text:span text:style-name="T2">Day 4 — Romans 5:9</text:span></text:p>
      <text:p text:style-name="P1"><text:span text:style-name="T2">Justified by the Blood of Christ</text:span></text:p>
      <text:p text:style-name="P1"><text:span text:style-name="T2">Day 5 — Romans 5:10</text:span></text:p>
      <text:p text:style-name="P1"><text:span text:style-name="T2">Reconciled Through the Death of Christ</text:span></text:p>
      <text:p text:style-name="P1"><text:span text:style-name="T2">Day 6 — Romans 5:11</text:span></text:p>
      <text:p text:style-name="P1"><text:span text:style-name="T2">Rejoicing in Our Reconciliation with God</text:span></text:p>
      <text:p text:style-name="P1"><text:span text:style-name="T2">Week 3: Romans 5:12–14 — Sin Entered Through Adam</text:span></text:p>
      <text:p text:style-name="P1"><text:span text:style-name="T2">Focus:</text:span></text:p>
      <text:p text:style-name="P1"><text:span text:style-name="T2"/></text:p>
      <text:p text:style-name="P1"><text:span text:style-name="T2">Pumasok ang kasalanan at kamatayan sa mundo sa pamamagitan ni Adan.</text:span></text:p>
      <text:p text:style-name="P1"><text:span text:style-name="T2"/></text:p>
      <text:p text:style-name="P1"><text:span text:style-name="T2">Key Idea:</text:span></text:p>
      <text:p text:style-name="P1"><text:span text:style-name="T2"/></text:p>
      <text:p text:style-name="P1"><text:span text:style-name="T2">Lahat ng tao ay naapektuhan ng kasalanan ni Adan.</text:span></text:p>
      <text:p text:style-name="P1"><text:span text:style-name="T2"/></text:p>
      <text:p text:style-name="P1"><text:span text:style-name="T2">Application:</text:span></text:p>
      <text:p text:style-name="P1"><text:span text:style-name="T2"/></text:p>
      <text:p text:style-name="P1"><text:span text:style-name="T2">Kilalanin ang lalim ng problema ng kasalanan upang higit na maunawaan ang laki ng biyaya ng Diyos.</text:span></text:p>
      <text:p text:style-name="P1"><text:span text:style-name="T2"/></text:p>
      <text:p text:style-name="P1"><text:span text:style-name="T2">Posibleng 6-Day Breakdown:</text:span></text:p>
      <text:p text:style-name="P1"><text:span text:style-name="T2">Day 1 — Romans 5:12a</text:span></text:p>
      <text:p text:style-name="P1"><text:span text:style-name="T2">Sin Entered the World</text:span></text:p>
      <text:p text:style-name="P1"><text:span text:style-name="T2">Day 2 — Romans 5:12b</text:span></text:p>
      <text:p text:style-name="P1"><text:span text:style-name="T2">Death Came Through Sin</text:span></text:p>
      <text:p text:style-name="P1"><text:span text:style-name="T2">Day 3 — Romans 5:12c</text:span></text:p>
      <text:p text:style-name="P1"><text:span text:style-name="T2">Death Spread to All Humanity</text:span></text:p>
      <text:p text:style-name="P1"><text:span text:style-name="T2">Day 4 — Romans 5:13</text:span></text:p>
      <text:p text:style-name="P1"><text:span text:style-name="T2">Sin Before the Law</text:span></text:p>
      <text:p text:style-name="P1"><text:span text:style-name="T2">Day 5 — Romans 5:14a</text:span></text:p>
      <text:p text:style-name="P1"><text:span text:style-name="T2">Death Reigned from Adam to Moses</text:span></text:p>
      <text:p text:style-name="P1"><text:span text:style-name="T2">Day 6 — Romans 5:14b</text:span></text:p>
      <text:p text:style-name="P1"><text:span text:style-name="T2">Adam as a Foreshadowing of Christ</text:span></text:p>
      <text:p text:style-name="P1"><text:span text:style-name="T2">Week 4: Romans 5:15–17 — Grace Is Greater Than Adam's Sin</text:span></text:p>
      <text:p text:style-name="P1"><text:span text:style-name="T2">Focus:</text:span></text:p>
      <text:p text:style-name="P1"><text:span text:style-name="T2"/></text:p>
      <text:p text:style-name="P1"><text:span text:style-name="T2">Ang biyaya ni Cristo ay higit na makapangyarihan kaysa sa naging epekto ng kasalanan ni Adan.</text:span></text:p>
      <text:p text:style-name="P1"><text:span text:style-name="T2"/></text:p>
      <text:p text:style-name="P1"><text:span text:style-name="T2">Key Idea:</text:span></text:p>
      <text:p text:style-name="P1"><text:span text:style-name="T2"/></text:p>
      <text:p text:style-name="P1"><text:span text:style-name="T2">Mas dakila ang biyaya ng Diyos kaysa sa pinsalang idinulot ng kasalanan.</text:span></text:p>
      <text:p text:style-name="P1"><text:span text:style-name="T2"/></text:p>
      <text:p text:style-name="P1"><text:span text:style-name="T2">Application:</text:span></text:p>
      <text:p text:style-name="P1"><text:span text:style-name="T2"/></text:p>
      <text:p text:style-name="P1"><text:span text:style-name="T2">Mamuhay nang may pagtitiwala sa kasapatan ng biyaya ni Cristo.</text:span></text:p>
      <text:p text:style-name="P1"><text:span text:style-name="T2"/></text:p>
      <text:p text:style-name="P1"><text:span text:style-name="T2">Posibleng 6-Day Breakdown:</text:span></text:p>
      <text:p text:style-name="P1"><text:span text:style-name="T2">Day 1 — Romans 5:15a</text:span></text:p>
      <text:p text:style-name="P1"><text:span text:style-name="T2">The Trespass of One Man</text:span></text:p>
      <text:p text:style-name="P1"><text:span text:style-name="T2">Day 2 — Romans 5:15b</text:span></text:p>
      <text:p text:style-name="P1"><text:span text:style-name="T2">God's Grace Abounds Even More</text:span></text:p>
      <text:p text:style-name="P1"><text:span text:style-name="T2">Day 3 — Romans 5:16</text:span></text:p>
      <text:p text:style-name="P1"><text:span text:style-name="T2">Judgment and the Gift Compared</text:span></text:p>
      <text:p text:style-name="P1"><text:span text:style-name="T2">Day 4 — Romans 5:17a</text:span></text:p>
      <text:p text:style-name="P1"><text:span text:style-name="T2">Death Reigned Through Adam</text:span></text:p>
      <text:p text:style-name="P1"><text:span text:style-name="T2">Day 5 — Romans 5:17b</text:span></text:p>
      <text:p text:style-name="P1"><text:span text:style-name="T2">Believers Reign in Life Through Christ</text:span></text:p>
      <text:p text:style-name="P1"><text:span text:style-name="T2">Day 6 — Romans 5:15–17</text:span></text:p>
      <text:p text:style-name="P1"><text:span text:style-name="T2">The Superiority of God's Grace</text:span></text:p>
      <text:p text:style-name="P1"><text:span text:style-name="T2">Week 5: Romans 5:18–21 — From Condemnation to Righteousness</text:span></text:p>
      <text:p text:style-name="P1"><text:span text:style-name="T2">Focus:</text:span></text:p>
      <text:p text:style-name="P1"><text:span text:style-name="T2"/></text:p>
      <text:p text:style-name="P1"><text:span text:style-name="T2">Kung paanong ang kasalanan ni Adan ay nagdala ng hatol, ang pagsunod ni Cristo ay nagdala ng katuwiran at buhay.</text:span></text:p>
      <text:p text:style-name="P1"><text:span text:style-name="T2"/></text:p>
      <text:p text:style-name="P1"><text:span text:style-name="T2">Key Idea:</text:span></text:p>
      <text:p text:style-name="P1"><text:span text:style-name="T2"/></text:p>
      <text:p text:style-name="P1"><text:span text:style-name="T2">Kay Cristo, ang biyaya ay nagtagumpay laban sa kasalanan at kamatayan.</text:span></text:p>
      <text:p text:style-name="P1"><text:span text:style-name="T2"/></text:p>
      <text:p text:style-name="P1"><text:span text:style-name="T2">Application:</text:span></text:p>
      <text:p text:style-name="P1"><text:span text:style-name="T2"/></text:p>
      <text:p text:style-name="P1"><text:span text:style-name="T2">Mamuhay sa bagong buhay na ibinigay ni Cristo at huwag nang bumalik sa kapangyarihan ng kasalanan.</text:span></text:p>
      <text:p text:style-name="P1"><text:span text:style-name="T2"/></text:p>
      <text:p text:style-name="P1"><text:span text:style-name="T2">Posibleng 6-Day Breakdown:</text:span></text:p>
      <text:p text:style-name="P1"><text:span text:style-name="T2">Day 1 — Romans 5:18</text:span></text:p>
      <text:p text:style-name="P1"><text:span text:style-name="T2">Condemnation and Justification</text:span></text:p>
      <text:p text:style-name="P1"><text:span text:style-name="T2">Day 2 — Romans 5:19</text:span></text:p>
      <text:p text:style-name="P1"><text:span text:style-name="T2">Adam's Disobedience and Christ's Obedience</text:span></text:p>
      <text:p text:style-name="P1"><text:span text:style-name="T2">Day 3 — Romans 5:20a</text:span></text:p>
      <text:p text:style-name="P1"><text:span text:style-name="T2">Why the Law Was Given</text:span></text:p>
      <text:p text:style-name="P1"><text:span text:style-name="T2">Day 4 — Romans 5:20b</text:span></text:p>
      <text:p text:style-name="P1"><text:span text:style-name="T2">Where Sin Increased, Grace Increased More</text:span></text:p>
      <text:p text:style-name="P1"><text:span text:style-name="T2">Day 5 — Romans 5:21a</text:span></text:p>
      <text:p text:style-name="P1"><text:span text:style-name="T2">Sin Once Reigned in Death</text:span></text:p>
      <text:p text:style-name="P1"><text:span text:style-name="T2">Day 6 — Romans 5:21b</text:span></text:p>
      <text:p text:style-name="P1"><text:span text:style-name="T2">Grace Reigns Through Righteousness unto Eternal Life</text:span></text:p>
      <text:p text:style-name="P1"><text:span text:style-name="T2">Bakit mas maganda ang ganitong structure?</text:span></text:p>
      <text:p text:style-name="P1"><text:span text:style-name="T2"/></text:p>
      <text:p text:style-name="P1"><text:span text:style-name="T2">Katulad ng ginawa mo sa Romans 4, bawat araw ay may sariling talata o malinaw na theological focus. Wala nang "reflection day" o "summary day." Sa halip, ang Day 6 ay nagsisilbing climax ng linggo, kung saan tinatalakay ang huling mahalagang bahagi ng talata o ang kabuuang pangunahing katotohanan ng seksyong iyon.</text:span></text:p>
      <text:p text:style-name="P1"><text:span text:style-name="T2"/></text:p>
      <text:p text:style-name="P1"><text:span text:style-name="T2">Sa tingin ko, ito ang format na maaari nang sundin sa buong natitirang aklat ng Romans para maging pare-pareho ang iyong devotional series—5 weeks bawat chapter, 6 na totoong lessons bawat linggo, at bawat lesson ay may sariling pangunahing talata at paksa.</text:span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