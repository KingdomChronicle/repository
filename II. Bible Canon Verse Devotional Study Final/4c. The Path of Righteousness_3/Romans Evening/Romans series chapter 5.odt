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omans 5 Series</text:span></text:p>
      <text:p text:style-name="P1"><text:span text:style-name="T1">Tema ng Chapter:</text:span></text:p>
      <text:p text:style-name="P1"><text:span text:style-name="T2"/></text:p>
      <text:p text:style-name="P1"><text:span text:style-name="T3">The Blessings of Justification: New Life Through Christ</text:span></text:p>
      <text:p text:style-name="P1"><text:span text:style-name="T4"/></text:p>
      <text:p text:style-name="P1"><text:span text:style-name="T5">Week 1: Romans 5:1</text:span><text:span text:style-name="T6">–</text:span><text:span text:style-name="T7">5<text:s/></text:span><text:span text:style-name="T8">—</text:span><text:span text:style-name="T9"><text:s/>Peace and Hope Through Justification</text:span></text:p>
      <text:p text:style-name="P1"><text:span text:style-name="T10">Focus:</text:span></text:p>
      <text:p text:style-name="P1"><text:span text:style-name="T11"/></text:p>
      <text:p text:style-name="P1"><text:span text:style-name="T12">Dahil tayo ay inaring-ganap sa pamamagitan ng pananampalataya, mayroon na tayong kapayapaan sa Diyos at matibay na pag-asa.</text:span></text:p>
      <text:p text:style-name="P1"><text:span text:style-name="T13"/></text:p>
      <text:p text:style-name="P1"><text:span text:style-name="T14">Key Idea:</text:span></text:p>
      <text:p text:style-name="P1"><text:span text:style-name="T15"/></text:p>
      <text:p text:style-name="P1"><text:span text:style-name="T16">Ang justification ay nagdudulot ng kapayapaan, biyaya, at pag-asang hindi nabibigo.</text:span></text:p>
      <text:p text:style-name="P1"><text:span text:style-name="T17"/></text:p>
      <text:p text:style-name="P1"><text:span text:style-name="T18">Application:</text:span></text:p>
      <text:p text:style-name="P1"><text:span text:style-name="T19"/></text:p>
      <text:p text:style-name="P1"><text:span text:style-name="T20">Mamuhay nang may kapanatagan dahil ang ating relasyon sa Diyos ay naibalik na kay Cristo.</text:span></text:p>
      <text:p text:style-name="P1"><text:span text:style-name="T21"/></text:p>
      <text:p text:style-name="P1"><text:span text:style-name="T22">Posibleng 6-Day Breakdown:</text:span></text:p>
      <text:p text:style-name="P1"><text:span text:style-name="T22">Day 1<text:s/></text:span><text:span text:style-name="T23">—</text:span><text:span text:style-name="T24"><text:s/>Romans 5:1</text:span></text:p>
      <text:p text:style-name="P1"><text:span text:style-name="T25">Peace with God</text:span></text:p>
      <text:p text:style-name="P1"><text:span text:style-name="T25">Day 2<text:s/></text:span><text:span text:style-name="T26">—</text:span><text:span text:style-name="T27"><text:s/>Romans 5:2a</text:span></text:p>
      <text:p text:style-name="P1"><text:span text:style-name="T28">Standing Firm in God's Grace</text:span></text:p>
      <text:p text:style-name="P1"><text:span text:style-name="T28">Day 3<text:s/></text:span><text:span text:style-name="T29">—</text:span><text:span text:style-name="T30"><text:s/>Romans 5:2b</text:span></text:p>
      <text:p text:style-name="P1"><text:span text:style-name="T31">Rejoicing in the Hope of God's Glory</text:span></text:p>
      <text:p text:style-name="P1"><text:span text:style-name="T31">Day 4<text:s/></text:span><text:span text:style-name="T32">—</text:span><text:span text:style-name="T33"><text:s/>Romans 5:3</text:span></text:p>
      <text:p text:style-name="P1"><text:span text:style-name="T34">Rejoicing Even in Suffering</text:span></text:p>
      <text:p text:style-name="P1"><text:span text:style-name="T34">Day 5<text:s/></text:span><text:span text:style-name="T35">—</text:span><text:span text:style-name="T36"><text:s/>Romans 5:4</text:span></text:p>
      <text:p text:style-name="P1"><text:span text:style-name="T37">Perseverance Produces Character</text:span></text:p>
      <text:p text:style-name="P1"><text:span text:style-name="T37">Day 6<text:s/></text:span><text:span text:style-name="T38">—</text:span><text:span text:style-name="T39"><text:s/>Romans 5:5</text:span></text:p>
      <text:p text:style-name="P1"><text:span text:style-name="T40">Hope That Never Disappoints</text:span></text:p>
      <text:p text:style-name="P1"><text:span text:style-name="T40">Week 2: Romans 5:6</text:span><text:span text:style-name="T41">–</text:span><text:span text:style-name="T42">11<text:s/></text:span><text:span text:style-name="T43">—</text:span><text:span text:style-name="T44"><text:s/>Christ Died for the Ungodly</text:span></text:p>
      <text:p text:style-name="P1"><text:span text:style-name="T45">Focus:</text:span></text:p>
      <text:p text:style-name="P1"><text:span text:style-name="T46"/></text:p>
      <text:p text:style-name="P1"><text:span text:style-name="T47">Ipinakita ng Diyos ang Kanyang pag-ibig nang mamatay si Cristo para sa mga makasalanan.</text:span></text:p>
      <text:p text:style-name="P1"><text:span text:style-name="T48"/></text:p>
      <text:p text:style-name="P1"><text:span text:style-name="T49">Key Idea:</text:span></text:p>
      <text:p text:style-name="P1"><text:span text:style-name="T50"/></text:p>
      <text:p text:style-name="P1"><text:span text:style-name="T51">Ang pag-ibig ng Diyos ang dahilan ng ating kaligtasan, hindi ang ating pagiging karapat-dapat.</text:span></text:p>
      <text:p text:style-name="P1"><text:span text:style-name="T52"/></text:p>
      <text:p text:style-name="P1"><text:span text:style-name="T53">Application:</text:span></text:p>
      <text:p text:style-name="P1"><text:span text:style-name="T54"/></text:p>
      <text:p text:style-name="P1"><text:span text:style-name="T55">Magpasalamat sa biyaya ng Diyos at mamuhay bilang taong pinagkasundo na Niya sa Kanyang sarili.</text:span></text:p>
      <text:p text:style-name="P1"><text:span text:style-name="T56"/></text:p>
      <text:p text:style-name="P1"><text:span text:style-name="T57">Posibleng 6-Day Breakdown:</text:span></text:p>
      <text:p text:style-name="P1"><text:span text:style-name="T57">Day 1<text:s/></text:span><text:span text:style-name="T58">—</text:span><text:span text:style-name="T59"><text:s/>Romans 5:6</text:span></text:p>
      <text:p text:style-name="P1"><text:span text:style-name="T60">Christ Died for the Helpless</text:span></text:p>
      <text:p text:style-name="P1"><text:span text:style-name="T60">Day 2<text:s/></text:span><text:span text:style-name="T61">—</text:span><text:span text:style-name="T62"><text:s/>Romans 5:7</text:span></text:p>
      <text:p text:style-name="P1"><text:span text:style-name="T63">The Limits of Human Love</text:span></text:p>
      <text:p text:style-name="P1"><text:span text:style-name="T63">Day 3<text:s/></text:span><text:span text:style-name="T64">—</text:span><text:span text:style-name="T65"><text:s/>Romans 5:8</text:span></text:p>
      <text:p text:style-name="P1"><text:span text:style-name="T66">God Demonstrated His Love</text:span></text:p>
      <text:p text:style-name="P1"><text:span text:style-name="T66">Day 4<text:s/></text:span><text:span text:style-name="T67">—</text:span><text:span text:style-name="T68"><text:s/>Romans 5:9</text:span></text:p>
      <text:p text:style-name="P1"><text:span text:style-name="T69">Justified by the Blood of Christ</text:span></text:p>
      <text:p text:style-name="P1"><text:span text:style-name="T69">Day 5<text:s/></text:span><text:span text:style-name="T70">—</text:span><text:span text:style-name="T71"><text:s/>Romans 5:10</text:span></text:p>
      <text:p text:style-name="P1"><text:span text:style-name="T72">Reconciled Through the Death of Christ</text:span></text:p>
      <text:p text:style-name="P1"><text:span text:style-name="T72">Day 6<text:s/></text:span><text:span text:style-name="T73">—</text:span><text:span text:style-name="T74"><text:s/>Romans 5:11</text:span></text:p>
      <text:p text:style-name="P1"><text:span text:style-name="T75">Rejoicing in Our Reconciliation with God</text:span></text:p>
      <text:p text:style-name="P1"><text:span text:style-name="T75"/></text:p>
      <text:p text:style-name="P1"><text:span text:style-name="T76">Week 3: Romans 5:12</text:span><text:span text:style-name="T77">–</text:span><text:span text:style-name="T78">14<text:s/></text:span><text:span text:style-name="T79">—</text:span><text:span text:style-name="T80"><text:s/>Sin Entered Through Adam</text:span></text:p>
      <text:p text:style-name="P1"><text:span text:style-name="T81">Focus:</text:span></text:p>
      <text:p text:style-name="P1"><text:span text:style-name="T82"/></text:p>
      <text:p text:style-name="P1"><text:span text:style-name="T83">Pumasok ang kasalanan at kamatayan sa mundo sa pamamagitan ni Adan.</text:span></text:p>
      <text:p text:style-name="P1"><text:span text:style-name="T84"/></text:p>
      <text:p text:style-name="P1"><text:span text:style-name="T85">Key Idea:</text:span></text:p>
      <text:p text:style-name="P1"><text:span text:style-name="T86"/></text:p>
      <text:p text:style-name="P1"><text:span text:style-name="T87">Lahat ng tao ay naapektuhan ng kasalanan ni Adan.</text:span></text:p>
      <text:p text:style-name="P1"><text:span text:style-name="T88"/></text:p>
      <text:p text:style-name="P1"><text:span text:style-name="T89">Application:</text:span></text:p>
      <text:p text:style-name="P1"><text:span text:style-name="T90"/></text:p>
      <text:p text:style-name="P1"><text:span text:style-name="T91">Kilalanin ang lalim ng problema ng kasalanan upang higit na maunawaan ang laki ng biyaya ng Diyos.</text:span></text:p>
      <text:p text:style-name="P1"><text:span text:style-name="T92"/></text:p>
      <text:p text:style-name="P1"><text:span text:style-name="T93">Posibleng 6-Day Breakdown:</text:span></text:p>
      <text:p text:style-name="P1"><text:span text:style-name="T93">Day 1<text:s/></text:span><text:span text:style-name="T94">—</text:span><text:span text:style-name="T95"><text:s/>Romans 5:12a</text:span></text:p>
      <text:p text:style-name="P1"><text:span text:style-name="T96">Sin Entered the World</text:span></text:p>
      <text:p text:style-name="P1"><text:span text:style-name="T96">Day 2<text:s/></text:span><text:span text:style-name="T97">—</text:span><text:span text:style-name="T98"><text:s/>Romans 5:12b</text:span></text:p>
      <text:p text:style-name="P1"><text:span text:style-name="T99">Death Came Through Sin</text:span></text:p>
      <text:p text:style-name="P1"><text:span text:style-name="T99">Day 3<text:s/></text:span><text:span text:style-name="T100">—</text:span><text:span text:style-name="T101"><text:s/>Romans 5:12c</text:span></text:p>
      <text:p text:style-name="P1"><text:span text:style-name="T102">Death Spread to All Humanity</text:span></text:p>
      <text:p text:style-name="P1"><text:span text:style-name="T102">Day 4<text:s/></text:span><text:span text:style-name="T103">—</text:span><text:span text:style-name="T104"><text:s/>Romans 5:13</text:span></text:p>
      <text:p text:style-name="P1"><text:span text:style-name="T105">Sin Before the Law</text:span></text:p>
      <text:p text:style-name="P1"><text:span text:style-name="T105">Day 5<text:s/></text:span><text:span text:style-name="T106">—</text:span><text:span text:style-name="T107"><text:s/>Romans 5:14a</text:span></text:p>
      <text:p text:style-name="P1"><text:span text:style-name="T108">Death Reigned from Adam to Moses</text:span></text:p>
      <text:p text:style-name="P1"><text:span text:style-name="T108">Day 6<text:s/></text:span><text:span text:style-name="T109">—</text:span><text:span text:style-name="T110"><text:s/>Romans 5:14b</text:span></text:p>
      <text:p text:style-name="P1"><text:span text:style-name="T111">Adam as a Foreshadowing of Christ</text:span></text:p>
      <text:p text:style-name="P1"><text:span text:style-name="T111"/></text:p>
      <text:p text:style-name="P1"><text:span text:style-name="T111">Week 4: Romans 5:15</text:span><text:span text:style-name="T112">–</text:span><text:span text:style-name="T113">17<text:s/></text:span><text:span text:style-name="T114">—</text:span><text:span text:style-name="T115"><text:s/>Grace Is Greater Than Adam's Sin</text:span></text:p>
      <text:p text:style-name="P1"><text:span text:style-name="T116">Focus:</text:span></text:p>
      <text:p text:style-name="P1"><text:span text:style-name="T117"/></text:p>
      <text:p text:style-name="P1"><text:span text:style-name="T118">Ang biyaya ni Cristo ay higit na makapangyarihan kaysa sa naging epekto ng kasalanan ni Adan.</text:span></text:p>
      <text:p text:style-name="P1"><text:span text:style-name="T119"/></text:p>
      <text:p text:style-name="P1"><text:span text:style-name="T120">Key Idea:</text:span></text:p>
      <text:p text:style-name="P1"><text:span text:style-name="T121"/></text:p>
      <text:p text:style-name="P1"><text:span text:style-name="T122">Mas dakila ang biyaya ng Diyos kaysa sa pinsalang idinulot ng kasalanan.</text:span></text:p>
      <text:p text:style-name="P1"><text:span text:style-name="T123"/></text:p>
      <text:p text:style-name="P1"><text:span text:style-name="T124">Application:</text:span></text:p>
      <text:p text:style-name="P1"><text:span text:style-name="T125"/></text:p>
      <text:p text:style-name="P1"><text:span text:style-name="T126">Mamuhay nang may pagtitiwala sa kasapatan ng biyaya ni Cristo.</text:span></text:p>
      <text:p text:style-name="P1"><text:span text:style-name="T127"/></text:p>
      <text:p text:style-name="P1"><text:span text:style-name="T128">Posibleng 6-Day Breakdown:</text:span></text:p>
      <text:p text:style-name="P1"><text:span text:style-name="T128">Day 1<text:s/></text:span><text:span text:style-name="T129">—</text:span><text:span text:style-name="T130"><text:s/>Romans 5:15a</text:span></text:p>
      <text:p text:style-name="P1"><text:span text:style-name="T131">The Trespass of One Man</text:span></text:p>
      <text:p text:style-name="P1"><text:span text:style-name="T131">Day 2<text:s/></text:span><text:span text:style-name="T132">—</text:span><text:span text:style-name="T133"><text:s/>Romans 5:15b</text:span></text:p>
      <text:p text:style-name="P1"><text:span text:style-name="T134">God's Grace Abounds Even More</text:span></text:p>
      <text:p text:style-name="P1"><text:span text:style-name="T134">Day 3<text:s/></text:span><text:span text:style-name="T135">—</text:span><text:span text:style-name="T136"><text:s/>Romans 5:16</text:span></text:p>
      <text:p text:style-name="P1"><text:span text:style-name="T137">Judgment and the Gift Compared</text:span></text:p>
      <text:p text:style-name="P1"><text:span text:style-name="T137">Day 4<text:s/></text:span><text:span text:style-name="T138">—</text:span><text:span text:style-name="T139"><text:s/>Romans 5:17a</text:span></text:p>
      <text:p text:style-name="P1"><text:span text:style-name="T140">Death Reigned Through Adam</text:span></text:p>
      <text:p text:style-name="P1"><text:span text:style-name="T140">Day 5<text:s/></text:span><text:span text:style-name="T141">—</text:span><text:span text:style-name="T142"><text:s/>Romans 5:17b</text:span></text:p>
      <text:p text:style-name="P1"><text:span text:style-name="T143">Believers Reign in Life Through Christ</text:span></text:p>
      <text:p text:style-name="P1"><text:span text:style-name="T143">Day 6<text:s/></text:span><text:span text:style-name="T144">—</text:span><text:span text:style-name="T145"><text:s/>Romans 5:15</text:span><text:span text:style-name="T146">–</text:span><text:span text:style-name="T147">17</text:span></text:p>
      <text:p text:style-name="P1"><text:span text:style-name="T148">The Superiority of God's Grace</text:span></text:p>
      <text:p text:style-name="P1"><text:span text:style-name="T148">Week 5: Romans 5:18</text:span><text:span text:style-name="T149">–</text:span><text:span text:style-name="T150">21<text:s/></text:span><text:span text:style-name="T151">—</text:span><text:span text:style-name="T152"><text:s/>From Condemnation to Righteousness</text:span></text:p>
      <text:p text:style-name="P1"><text:span text:style-name="T153">Focus:</text:span></text:p>
      <text:p text:style-name="P1"><text:span text:style-name="T154"/></text:p>
      <text:p text:style-name="P1"><text:span text:style-name="T155">Kung paanong ang kasalanan ni Adan ay nagdala ng hatol, ang pagsunod ni Cristo ay nagdala ng katuwiran at buhay.</text:span></text:p>
      <text:p text:style-name="P1"><text:span text:style-name="T156"/></text:p>
      <text:p text:style-name="P1"><text:span text:style-name="T157">Key Idea:</text:span></text:p>
      <text:p text:style-name="P1"><text:span text:style-name="T158"/></text:p>
      <text:p text:style-name="P1"><text:span text:style-name="T159">Kay Cristo, ang biyaya ay nagtagumpay laban sa kasalanan at kamatayan.</text:span></text:p>
      <text:p text:style-name="P1"><text:span text:style-name="T160"/></text:p>
      <text:p text:style-name="P1"><text:span text:style-name="T161">Application:</text:span></text:p>
      <text:p text:style-name="P1"><text:span text:style-name="T162"/></text:p>
      <text:p text:style-name="P1"><text:span text:style-name="T163">Mamuhay sa bagong buhay na ibinigay ni Cristo at huwag nang bumalik sa kapangyarihan ng kasalanan.</text:span></text:p>
      <text:p text:style-name="P1"><text:span text:style-name="T164"/></text:p>
      <text:p text:style-name="P1"><text:span text:style-name="T165">Posibleng 6-Day Breakdown:</text:span></text:p>
      <text:p text:style-name="P1"><text:span text:style-name="T165">Day 1<text:s/></text:span><text:span text:style-name="T166">—</text:span><text:span text:style-name="T167"><text:s/>Romans 5:18</text:span></text:p>
      <text:p text:style-name="P1"><text:span text:style-name="T168">Condemnation and Justification</text:span></text:p>
      <text:p text:style-name="P1"><text:span text:style-name="T168">Day 2<text:s/></text:span><text:span text:style-name="T169">—</text:span><text:span text:style-name="T170"><text:s/>Romans 5:19</text:span></text:p>
      <text:p text:style-name="P1"><text:span text:style-name="T171">Adam's Disobedience and Christ's Obedience</text:span></text:p>
      <text:p text:style-name="P1"><text:span text:style-name="T171">Day 3<text:s/></text:span><text:span text:style-name="T172">—</text:span><text:span text:style-name="T173"><text:s/>Romans 5:20a</text:span></text:p>
      <text:p text:style-name="P1"><text:span text:style-name="T174">Why the Law Was Given</text:span></text:p>
      <text:p text:style-name="P1"><text:span text:style-name="T174">Day 4<text:s/></text:span><text:span text:style-name="T175">—</text:span><text:span text:style-name="T176"><text:s/>Romans 5:20b</text:span></text:p>
      <text:p text:style-name="P1"><text:span text:style-name="T177">Where Sin Increased, Grace Increased More</text:span></text:p>
      <text:p text:style-name="P1"><text:span text:style-name="T177">Day 5<text:s/></text:span><text:span text:style-name="T178">—</text:span><text:span text:style-name="T179"><text:s/>Romans 5:21a</text:span></text:p>
      <text:p text:style-name="P1"><text:span text:style-name="T180">Sin Once Reigned in Death</text:span></text:p>
      <text:p text:style-name="P1"><text:span text:style-name="T180">Day 6<text:s/></text:span><text:span text:style-name="T181">—</text:span><text:span text:style-name="T182"><text:s/>Romans 5:21b</text:span></text:p>
      <text:p text:style-name="P1"><text:span text:style-name="T183">Grace Reigns Through Righteousness unto Eternal Life</text:span></text:p>
      <text:p text:style-name="P1"><text:span text:style-name="T183">Bakit mas maganda ang ganitong structure?</text:span></text:p>
      <text:p text:style-name="P1"><text:span text:style-name="T184"/></text:p>
      <text:p text:style-name="P1"><text:span text:style-name="T185">Katulad ng ginawa mo sa Romans 4, bawat araw ay may sariling talata o malinaw na theological focus. Wala nang "reflection day" o "summary day." Sa halip, ang Day 6 ay nagsisilbing climax ng linggo, kung saan tinatalakay ang huling mahalagang bahagi ng talata o ang kabuuang pangunahing katotohanan ng seksyong iyon.</text:span></text:p>
      <text:p text:style-name="P1"><text:span text:style-name="T186"/></text:p>
      <text:p text:style-name="P1"><text:span text:style-name="T187">Sa tingin ko, ito ang format na maaari nang sundin sa buong natitirang aklat ng Romans para maging pare-pareho ang iyong devotional series</text:span><text:span text:style-name="T188">—</text:span><text:span text:style-name="T189">5 weeks bawat chapter, 6 na totoong lessons bawat linggo, at bawat lesson ay may sariling pangunahing talata at paksa.</text:span><text:span text:style-name="T19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