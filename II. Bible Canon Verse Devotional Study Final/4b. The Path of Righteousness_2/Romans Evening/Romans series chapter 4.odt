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1.599cm" table:align="left"/>
    </style:style>
    <style:style style:name="Table1.A" style:family="table-column">
      <style:table-column-properties style:column-width="1.482cm"/>
    </style:style>
    <style:style style:name="Table1.B" style:family="table-column">
      <style:table-column-properties style:column-width="3.062cm"/>
    </style:style>
    <style:style style:name="Table1.C" style:family="table-column">
      <style:table-column-properties style:column-width="7.05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justify" style:justify-single-word="false"/>
      <style:text-properties fo:color="#000000" style:text-position="0% 100%" style:font-name="Arial" fo:font-size="16pt" fo:font-style="italic" fo:font-weight="normal" officeooo:rsid="000f7237" officeooo:paragraph-rsid="000bfaf4" style:font-size-asian="16pt" style:font-style-asian="italic" style:font-weight-asian="normal" style:font-size-complex="16pt" style:font-style-complex="italic" style:font-weight-complex="normal"/>
    </style:style>
    <style:style style:name="P2" style:family="paragraph" style:parent-style-name="Heading_20_2">
      <style:paragraph-properties fo:text-align="justify" style:justify-single-word="false"/>
      <style:text-properties fo:color="#000000" style:text-position="0% 100%" style:font-name="Arial" fo:font-size="16pt" fo:font-style="italic" fo:font-weight="normal" officeooo:rsid="000f7237" officeooo:paragraph-rsid="002d8249" style:font-size-asian="16pt" style:font-style-asian="italic" style:font-weight-asian="normal" style:font-size-complex="16pt" style:font-style-complex="italic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color="#000000" style:text-position="0% 100%" style:font-name="Arial" fo:font-size="16pt" fo:font-style="italic" fo:font-weight="normal" officeooo:rsid="000f7237" officeooo:paragraph-rsid="000bfaf4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color="#000000" style:text-position="0% 100%" style:font-name="Arial" fo:font-size="16pt" fo:font-style="italic" fo:font-weight="normal" officeooo:rsid="000f7237" officeooo:paragraph-rsid="002d8249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Horizontal_20_Line">
      <style:text-properties fo:color="#5983b0"/>
    </style:style>
    <style:style style:name="P6" style:family="paragraph" style:parent-style-name="Heading_20_1">
      <style:paragraph-properties fo:text-align="justify" style:justify-single-word="false"/>
      <style:text-properties fo:color="#000000" style:text-position="0% 100%" style:font-name="Arial" fo:font-size="16pt" fo:font-style="italic" fo:font-weight="normal" officeooo:rsid="000f7237" officeooo:paragraph-rsid="002d8249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>
      <style:paragraph-properties fo:text-align="justify" style:justify-single-word="false"/>
      <style:text-properties fo:color="#000000" style:text-position="0% 100%" style:font-name="Arial" fo:font-size="16pt" fo:font-style="italic" fo:font-weight="normal" officeooo:rsid="000f7237" officeooo:paragraph-rsid="002d8249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P18" style:family="paragraph" style:parent-style-name="Text_20_body" style:list-style-name="L4">
      <style:paragraph-properties fo:margin-top="0cm" fo:margin-bottom="0cm" loext:contextual-spacing="false"/>
    </style:style>
    <style:style style:name="P19" style:family="paragraph" style:parent-style-name="Text_20_body" style:list-style-name="L5">
      <style:paragraph-properties fo:margin-top="0cm" fo:margin-bottom="0cm" loext:contextual-spacing="false"/>
    </style:style>
    <style:style style:name="P20" style:family="paragraph" style:parent-style-name="Text_20_body" style:list-style-name="L6">
      <style:paragraph-properties fo:margin-top="0cm" fo:margin-bottom="0cm" loext:contextual-spacing="false"/>
    </style:style>
    <style:style style:name="P21" style:family="paragraph" style:parent-style-name="Text_20_body" style:list-style-name="L7">
      <style:paragraph-properties fo:margin-top="0cm" fo:margin-bottom="0cm" loext:contextual-spacing="false"/>
    </style:style>
    <style:style style:name="P22" style:family="paragraph" style:parent-style-name="Text_20_body" style:list-style-name="L8">
      <style:paragraph-properties fo:margin-top="0cm" fo:margin-bottom="0cm" loext:contextual-spacing="false"/>
    </style:style>
    <style:style style:name="T1" style:family="text">
      <style:text-properties fo:font-variant="normal" fo:text-transform="none" fo:font-size="12pt" fo:letter-spacing="normal" fo:font-weight="bold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font-size="12pt" fo:letter-spacing="normal" fo:font-weight="bold" officeooo:rsid="002d8249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fo:font-size="12pt" fo:letter-spacing="normal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font-size="12pt" fo:letter-spacing="normal" fo:font-weight="normal" officeooo:rsid="002d8249" style:font-size-asian="18pt" style:font-weight-asian="normal" style:font-size-complex="18pt" style:font-weight-complex="normal"/>
    </style:style>
    <style:style style:name="T5" style:family="text">
      <style:text-properties officeooo:rsid="002d8249"/>
    </style:style>
    <style:style style:name="T6" style:family="text">
      <style:text-properties fo:color="#5983b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Strong_20_Emphasis"><text:span text:style-name="T4">Romans 4 Series</text:span></text:span></text:h>
      <text:h text:style-name="Heading_20_2" text:outline-level="2">Tema ng Chapter:</text:h>
      <text:p text:style-name="Text_20_body"><text:span text:style-name="Strong_20_Emphasis">Justified by Faith: Ang Halimbawa ni Abraham</text:span></text:p>
      <text:p text:style-name="Horizontal_20_Line"/>
      <text:h text:style-name="Heading_20_1" text:outline-level="1">Week 1: Romans 4:1–8 — Abraham Was Justified by Faith</text:h>
      <text:h text:style-name="Heading_20_3" text:outline-level="3">Focus:</text:h>
      <text:p text:style-name="Text_20_body">Si Abraham ay itinuring na matuwid dahil sa pananampalataya, hindi dahil sa kanyang mga gawa.</text:p>
      <text:h text:style-name="Heading_20_3" text:outline-level="3">Key Idea:</text:h>
      <text:p text:style-name="Text_20_body">Ang kaligtasan ay regalo ng biyaya, hindi sahod ng mabubuting gawa.</text:p>
      <text:h text:style-name="Heading_20_3" text:outline-level="3">Application:</text:h>
      <text:p text:style-name="Text_20_body">Matuto na magtiwala sa ginawa ng Diyos kaysa umasa sa sariling kakayahan.</text:p>
      <text:h text:style-name="Heading_20_3" text:outline-level="3">Posibleng 6-Day Breakdown:</text:h>
      <text:list xml:id="list545966334" text:style-name="L4">
        <text:list-item>
          <text:p text:style-name="P18">Day 1 — Romans 4:1 </text:p>
        </text:list-item>
        <text:list-item>
          <text:p text:style-name="P18">Day 2 — Romans 4:2 </text:p>
        </text:list-item>
        <text:list-item>
          <text:p text:style-name="P18">Day 3 — Romans 4:3 </text:p>
        </text:list-item>
        <text:list-item>
          <text:p text:style-name="P18">Day 4 — Romans 4:4 </text:p>
        </text:list-item>
        <text:list-item>
          <text:p text:style-name="P18">Day 5 — Romans 4:5 </text:p>
        </text:list-item>
        <text:list-item>
          <text:p text:style-name="P11">Day 6 — Romans 4:6–8 </text:p>
        </text:list-item>
      </text:list>
      <text:p text:style-name="Horizontal_20_Line"/>
      <text:h text:style-name="Heading_20_1" text:outline-level="1">Week 2: Romans 4:9–12 — Faith Before Circumcision</text:h>
      <text:h text:style-name="Heading_20_3" text:outline-level="3">Focus:</text:h>
      <text:p text:style-name="Text_20_body">Tinanggap ng Diyos si Abraham bago pa siya tuliin.</text:p>
      <text:h text:style-name="Heading_20_3" text:outline-level="3">Key Idea:</text:h>
      <text:p text:style-name="Text_20_body">Ang pananampalataya ang batayan ng pagtanggap ng Diyos, hindi relihiyosong ritwal.</text:p>
      <text:h text:style-name="Heading_20_3" text:outline-level="3"><text:soft-page-break/>Application:</text:h>
      <text:p text:style-name="Text_20_body">Huwag umasa sa mga panlabas na gawain bilang sukatan ng relasyon sa Diyos.</text:p>
      <text:h text:style-name="Heading_20_3" text:outline-level="3">Posibleng 6-Day Breakdown:</text:h>
      <text:list xml:id="list2626748506" text:style-name="L5">
        <text:list-item>
          <text:p text:style-name="P19">Day 1 — Romans 4:9 </text:p>
        </text:list-item>
        <text:list-item>
          <text:p text:style-name="P19">Day 2 — Romans 4:10 </text:p>
        </text:list-item>
        <text:list-item>
          <text:p text:style-name="P19">Day 3 — Romans 4:11a </text:p>
        </text:list-item>
        <text:list-item>
          <text:p text:style-name="P19">Day 4 — Romans 4:11b </text:p>
        </text:list-item>
        <text:list-item>
          <text:p text:style-name="P19">Day 5 — Romans 4:12 </text:p>
        </text:list-item>
        <text:list-item>
          <text:p text:style-name="P12">Day 6 — Review and Reflection </text:p>
        </text:list-item>
      </text:list>
      <text:p text:style-name="Horizontal_20_Line"/>
      <text:h text:style-name="Heading_20_1" text:outline-level="1">Week 3: Romans 4:13–17 — The Promise Comes Through Faith</text:h>
      <text:h text:style-name="Heading_20_3" text:outline-level="3">Focus:</text:h>
      <text:p text:style-name="Text_20_body">Ang pangako ng Diyos ay natatanggap sa pamamagitan ng pananampalataya, hindi ng kautusan.</text:p>
      <text:h text:style-name="Heading_20_3" text:outline-level="3">Key Idea:</text:h>
      <text:p text:style-name="Text_20_body">Ang biyaya at pananampalataya ang daan upang matanggap ang mga pangako ng Diyos.</text:p>
      <text:h text:style-name="Heading_20_3" text:outline-level="3">Application:</text:h>
      <text:p text:style-name="Text_20_body">Magtiwala sa mga pangako ng Diyos kahit hindi pa nakikita ang katuparan.</text:p>
      <text:h text:style-name="Heading_20_3" text:outline-level="3">Posibleng 6-Day Breakdown:</text:h>
      <text:list xml:id="list2632224119" text:style-name="L6">
        <text:list-item>
          <text:p text:style-name="P20">Day 1 — Romans 4:13 </text:p>
        </text:list-item>
        <text:list-item>
          <text:p text:style-name="P20">Day 2 — Romans 4:14 </text:p>
        </text:list-item>
        <text:list-item>
          <text:p text:style-name="P20">Day 3 — Romans 4:15 </text:p>
        </text:list-item>
        <text:list-item>
          <text:p text:style-name="P20">Day 4 — Romans 4:16 </text:p>
        </text:list-item>
        <text:list-item>
          <text:p text:style-name="P20">Day 5 — Romans 4:17 </text:p>
        </text:list-item>
        <text:list-item>
          <text:p text:style-name="P13">Day 6 — Reflection on God's Promises </text:p>
        </text:list-item>
      </text:list>
      <text:p text:style-name="Horizontal_20_Line"/>
      <text:h text:style-name="Heading_20_1" text:outline-level="1"><text:soft-page-break/>Week 4: Romans 4:18–22 — Abraham's Unwavering Faith</text:h>
      <text:h text:style-name="Heading_20_3" text:outline-level="3">Focus:</text:h>
      <text:p text:style-name="Text_20_body">Nanatiling nanampalataya si Abraham kahit tila imposible ang sitwasyon.</text:p>
      <text:h text:style-name="Heading_20_3" text:outline-level="3">Key Idea:</text:h>
      <text:p text:style-name="Text_20_body">Ang tunay na pananampalataya ay nagtitiwala sa kapangyarihan ng Diyos kaysa sa nakikita ng mata.</text:p>
      <text:h text:style-name="Heading_20_3" text:outline-level="3">Application:</text:h>
      <text:p text:style-name="Text_20_body">Magtiwala sa Diyos kahit mahirap at tila imposible ang iyong kalagayan.</text:p>
      <text:h text:style-name="Heading_20_3" text:outline-level="3">Posibleng 6-Day Breakdown:</text:h>
      <text:list xml:id="list4097068946" text:style-name="L7">
        <text:list-item>
          <text:p text:style-name="P21">Day 1 — Romans 4:18 </text:p>
        </text:list-item>
        <text:list-item>
          <text:p text:style-name="P21">Day 2 — Romans 4:19 </text:p>
        </text:list-item>
        <text:list-item>
          <text:p text:style-name="P21">Day 3 — Romans 4:20 </text:p>
        </text:list-item>
        <text:list-item>
          <text:p text:style-name="P21">Day 4 — Romans 4:21 </text:p>
        </text:list-item>
        <text:list-item>
          <text:p text:style-name="P21">Day 5 — Romans 4:22 </text:p>
        </text:list-item>
        <text:list-item>
          <text:p text:style-name="P14">Day 6 — Reflection on Trusting God </text:p>
        </text:list-item>
      </text:list>
      <text:p text:style-name="Horizontal_20_Line"/>
      <text:h text:style-name="Heading_20_1" text:outline-level="1">Week 5: Romans 4:23–25 — Faith for All Believers</text:h>
      <text:h text:style-name="Heading_20_3" text:outline-level="3">Focus:</text:h>
      <text:p text:style-name="Text_20_body">Ang karanasan ni Abraham ay halimbawa para sa lahat ng mananampalataya.</text:p>
      <text:h text:style-name="Heading_20_3" text:outline-level="3">Key Idea:</text:h>
      <text:p text:style-name="Text_20_body">Ang parehong pananampalatayang nagligtas kay Abraham ay siya ring pananampalatayang nagliligtas sa atin kay Cristo.</text:p>
      <text:h text:style-name="Heading_20_3" text:outline-level="3">Application:</text:h>
      <text:p text:style-name="Text_20_body">Isentro ang iyong pananampalataya kay Jesus at sa Kanyang natapos na gawain.</text:p>
      <text:h text:style-name="Heading_20_3" text:outline-level="3">Posibleng 6-Day Breakdown:</text:h>
      <text:list xml:id="list4132062085" text:style-name="L8">
        <text:list-item>
          <text:p text:style-name="P22">Day 1 — Romans 4:23 </text:p>
        </text:list-item>
        <text:list-item>
          <text:p text:style-name="P22">Day 2 — Romans 4:24a </text:p>
        </text:list-item>
        <text:list-item>
          <text:p text:style-name="P22"><text:soft-page-break/>Day 3 — Romans 4:24b </text:p>
        </text:list-item>
        <text:list-item>
          <text:p text:style-name="P22">Day 4 — Romans 4:25a </text:p>
        </text:list-item>
        <text:list-item>
          <text:p text:style-name="P22">Day 5 — Romans 4:25b </text:p>
        </text:list-item>
        <text:list-item>
          <text:p text:style-name="P15">Day 6 — Chapter Summary and Personal Response </text:p>
        </text:list-item>
      </text:list>
      <text:p text:style-name="Horizontal_20_Line"/>
      <text:h text:style-name="Heading_20_3" text:outline-level="3">Buod ng Romans 4 Seri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Week</text:p>
            </table:table-cell>
            <table:table-cell table:style-name="Table1.A1" office:value-type="string">
              <text:p text:style-name="Table_20_Heading">Passage</text:p>
            </table:table-cell>
            <table:table-cell table:style-name="Table1.A1" office:value-type="string">
              <text:p text:style-name="Table_20_Heading">Focus</text:p>
            </table:table-cell>
          </table:table-row>
        </table:table-header-rows>
        <table:table-row>
          <table:table-cell table:style-name="Table1.A1" office:value-type="string">
            <text:p text:style-name="Table_20_Contents">Week 1</text:p>
          </table:table-cell>
          <table:table-cell table:style-name="Table1.A1" office:value-type="string">
            <text:p text:style-name="Table_20_Contents">Romans 4:1–8</text:p>
          </table:table-cell>
          <table:table-cell table:style-name="Table1.A1" office:value-type="string">
            <text:p text:style-name="Table_20_Contents">Justified by Faith, Not Works</text:p>
          </table:table-cell>
        </table:table-row>
        <table:table-row>
          <table:table-cell table:style-name="Table1.A1" office:value-type="string">
            <text:p text:style-name="Table_20_Contents">Week 2</text:p>
          </table:table-cell>
          <table:table-cell table:style-name="Table1.A1" office:value-type="string">
            <text:p text:style-name="Table_20_Contents">Romans 4:9–12</text:p>
          </table:table-cell>
          <table:table-cell table:style-name="Table1.A1" office:value-type="string">
            <text:p text:style-name="Table_20_Contents">Faith Before Religious Rituals</text:p>
          </table:table-cell>
        </table:table-row>
        <table:table-row>
          <table:table-cell table:style-name="Table1.A1" office:value-type="string">
            <text:p text:style-name="Table_20_Contents">Week 3</text:p>
          </table:table-cell>
          <table:table-cell table:style-name="Table1.A1" office:value-type="string">
            <text:p text:style-name="Table_20_Contents">Romans 4:13–17</text:p>
          </table:table-cell>
          <table:table-cell table:style-name="Table1.A1" office:value-type="string">
            <text:p text:style-name="Table_20_Contents">God's Promise Through Faith</text:p>
          </table:table-cell>
        </table:table-row>
        <table:table-row>
          <table:table-cell table:style-name="Table1.A1" office:value-type="string">
            <text:p text:style-name="Table_20_Contents">Week 4</text:p>
          </table:table-cell>
          <table:table-cell table:style-name="Table1.A1" office:value-type="string">
            <text:p text:style-name="Table_20_Contents">Romans 4:18–22</text:p>
          </table:table-cell>
          <table:table-cell table:style-name="Table1.A1" office:value-type="string">
            <text:p text:style-name="Table_20_Contents">Trusting God Against All Odds</text:p>
          </table:table-cell>
        </table:table-row>
        <table:table-row>
          <table:table-cell table:style-name="Table1.A1" office:value-type="string">
            <text:p text:style-name="Table_20_Contents">Week 5</text:p>
          </table:table-cell>
          <table:table-cell table:style-name="Table1.A1" office:value-type="string">
            <text:p text:style-name="Table_20_Contents">Romans 4:23–25</text:p>
          </table:table-cell>
          <table:table-cell table:style-name="Table1.A1" office:value-type="string">
            <text:p text:style-name="Table_20_Contents">Abraham's Faith and Our Faith in Christ</text:p>
          </table:table-cell>
        </table:table-row>
      </table:table>
      <text:p text:style-name="Text_20_body">Magandang progression ito dahil mula sa <text:span text:style-name="Strong_20_Emphasis">"faith not works" → "faith not rituals" → "faith receives God's promises" → "faith trusts God's power" → "faith in Christ saves us today."</text:span> Ito rin ang natural na argumento ni Pablo sa buong Romans 4.</text:p>
      <text:p text:style-name="P4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P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25T14:26:07.251000000</meta:creation-date>
    <dc:date>2026-05-31T10:17:42.767000000</dc:date>
    <meta:editing-duration>PT15H36M2S</meta:editing-duration>
    <meta:editing-cycles>13</meta:editing-cycles>
    <meta:generator>Neat_Office/6.2.8.2$Windows_x86 LibreOffice_project/</meta:generator>
    <meta:document-statistic meta:table-count="1" meta:image-count="0" meta:object-count="0" meta:page-count="4" meta:paragraph-count="93" meta:word-count="534" meta:character-count="3005" meta:non-whitespace-character-count="2540"/>
  </office:meta>
</office:document-meta>
</file>