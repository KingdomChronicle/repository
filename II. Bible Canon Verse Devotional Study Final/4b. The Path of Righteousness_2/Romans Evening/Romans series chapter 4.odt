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2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top="12.00pt" fo:margin-bottom="6.00pt"/>
    </style:style>
    <style:style style:name="P2" style:family="paragraph">
      <style:paragraph-properties fo:line-height="100.00%" fo:text-align="left" fo:margin-top="10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left" fo:margin-bottom="14.15p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 fo:margin-top="7.00pt" fo:margin-bottom="6.00pt"/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00.00%" fo:text-align="left" fo:margin-top="7.00pt" fo:margin-bottom="6.00p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00.00%" fo:text-align="left" fo:margin-top="7.00pt" fo:margin-bottom="6.00pt"/>
    </style:style>
    <text:list-style style:name="L1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bottom="7.00pt"/>
    </style:style>
    <style:style style:name="P15" style:family="paragraph">
      <style:paragraph-properties fo:line-height="100.00%" fo:text-align="left" fo:margin-bottom="14.15pt"/>
    </style:style>
    <style:style style:name="P16" style:family="paragraph">
      <style:paragraph-properties fo:line-height="100.00%" fo:text-align="left" fo:margin-top="12.00pt" fo:margin-bottom="6.00pt"/>
    </style:style>
    <style:style style:name="P17" style:family="paragraph">
      <style:paragraph-properties fo:line-height="100.00%" fo:text-align="left" fo:margin-top="7.00pt" fo:margin-bottom="6.00pt"/>
    </style: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 fo:margin-top="7.00pt" fo:margin-bottom="6.00pt"/>
    </style: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00.00%" fo:text-align="left" fo:margin-top="7.00pt" fo:margin-bottom="6.00pt"/>
    </style:style>
    <style:style style:name="P22" style:family="paragraph">
      <style:paragraph-properties fo:line-height="115.00%" fo:text-align="left" fo:margin-bottom="7.00pt"/>
    </style:style>
    <style:style style:name="P23" style:family="paragraph">
      <style:paragraph-properties fo:line-height="100.00%" fo:text-align="left" fo:margin-top="7.00pt" fo:margin-bottom="6.00pt"/>
    </style:style>
    <text:list-style style:name="L24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00.00%" fo:text-align="left" fo:margin-bottom="14.15pt"/>
    </style:style>
    <style:style style:name="P27" style:family="paragraph">
      <style:paragraph-properties fo:line-height="100.00%" fo:text-align="left" fo:margin-top="12.00pt" fo:margin-bottom="6.00pt"/>
    </style:style>
    <style:style style:name="P28" style:family="paragraph">
      <style:paragraph-properties fo:line-height="100.00%" fo:text-align="left" fo:margin-top="7.00pt" fo:margin-bottom="6.00pt"/>
    </style:style>
    <style:style style:name="P29" style:family="paragraph">
      <style:paragraph-properties fo:line-height="115.00%" fo:text-align="left" fo:margin-bottom="7.00pt"/>
    </style:style>
    <style:style style:name="P30" style:family="paragraph">
      <style:paragraph-properties fo:line-height="100.00%" fo:text-align="left" fo:margin-top="7.00pt" fo:margin-bottom="6.00pt"/>
    </style:style>
    <style:style style:name="P31" style:family="paragraph">
      <style:paragraph-properties fo:line-height="115.00%" fo:text-align="left" fo:margin-bottom="7.00pt"/>
    </style:style>
    <style:style style:name="P32" style:family="paragraph">
      <style:paragraph-properties fo:line-height="100.00%" fo:text-align="left" fo:margin-top="7.00pt" fo:margin-bottom="6.00pt"/>
    </style:style>
    <style:style style:name="P33" style:family="paragraph">
      <style:paragraph-properties fo:line-height="115.00%" fo:text-align="left" fo:margin-bottom="7.00pt"/>
    </style:style>
    <style:style style:name="P34" style:family="paragraph">
      <style:paragraph-properties fo:line-height="100.00%" fo:text-align="left" fo:margin-top="7.00pt" fo:margin-bottom="6.00pt"/>
    </style:style>
    <text:list-style style:name="L3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35" style:family="paragraph">
      <style:paragraph-properties fo:line-height="115.00%" fo:text-align="left"/>
    </style:style>
    <style:style style:name="P36" style:family="paragraph">
      <style:paragraph-properties fo:line-height="115.00%" fo:text-align="left" fo:margin-bottom="7.00pt"/>
    </style:style>
    <style:style style:name="P37" style:family="paragraph">
      <style:paragraph-properties fo:line-height="100.00%" fo:text-align="left" fo:margin-bottom="14.15pt"/>
    </style:style>
    <style:style style:name="P38" style:family="paragraph">
      <style:paragraph-properties fo:line-height="100.00%" fo:text-align="left" fo:margin-top="12.00pt" fo:margin-bottom="6.00pt"/>
    </style:style>
    <style:style style:name="P39" style:family="paragraph">
      <style:paragraph-properties fo:line-height="100.00%" fo:text-align="left" fo:margin-top="7.00pt" fo:margin-bottom="6.00pt"/>
    </style:style>
    <style:style style:name="P40" style:family="paragraph">
      <style:paragraph-properties fo:line-height="115.00%" fo:text-align="left" fo:margin-bottom="7.00pt"/>
    </style:style>
    <style:style style:name="P41" style:family="paragraph">
      <style:paragraph-properties fo:line-height="100.00%" fo:text-align="left" fo:margin-top="7.00pt" fo:margin-bottom="6.00pt"/>
    </style:style>
    <style:style style:name="P42" style:family="paragraph">
      <style:paragraph-properties fo:line-height="115.00%" fo:text-align="left" fo:margin-bottom="7.00pt"/>
    </style:style>
    <style:style style:name="P43" style:family="paragraph">
      <style:paragraph-properties fo:line-height="100.00%" fo:text-align="left" fo:margin-top="7.00pt" fo:margin-bottom="6.00pt"/>
    </style:style>
    <style:style style:name="P44" style:family="paragraph">
      <style:paragraph-properties fo:line-height="115.00%" fo:text-align="left" fo:margin-bottom="7.00pt"/>
    </style:style>
    <style:style style:name="P45" style:family="paragraph">
      <style:paragraph-properties fo:line-height="100.00%" fo:text-align="left" fo:margin-top="7.00pt" fo:margin-bottom="6.00pt"/>
    </style:style>
    <text:list-style style:name="L4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46" style:family="paragraph">
      <style:paragraph-properties fo:line-height="115.00%" fo:text-align="left"/>
    </style:style>
    <style:style style:name="P47" style:family="paragraph">
      <style:paragraph-properties fo:line-height="115.00%" fo:text-align="left" fo:margin-bottom="7.00pt"/>
    </style:style>
    <style:style style:name="P48" style:family="paragraph">
      <style:paragraph-properties fo:line-height="100.00%" fo:text-align="left" fo:margin-bottom="14.15pt"/>
    </style:style>
    <style:style style:name="P49" style:family="paragraph">
      <style:paragraph-properties fo:line-height="100.00%" fo:text-align="left" fo:margin-top="12.00pt" fo:margin-bottom="6.00pt"/>
    </style:style>
    <style:style style:name="P50" style:family="paragraph">
      <style:paragraph-properties fo:line-height="100.00%" fo:text-align="left" fo:margin-top="7.00pt" fo:margin-bottom="6.00pt"/>
    </style:style>
    <style:style style:name="P51" style:family="paragraph">
      <style:paragraph-properties fo:line-height="115.00%" fo:text-align="left" fo:margin-bottom="7.00pt"/>
    </style:style>
    <style:style style:name="P52" style:family="paragraph">
      <style:paragraph-properties fo:line-height="100.00%" fo:text-align="left" fo:margin-top="7.00pt" fo:margin-bottom="6.00pt"/>
    </style:style>
    <style:style style:name="P53" style:family="paragraph">
      <style:paragraph-properties fo:line-height="115.00%" fo:text-align="left" fo:margin-bottom="7.00pt"/>
    </style:style>
    <style:style style:name="P54" style:family="paragraph">
      <style:paragraph-properties fo:line-height="100.00%" fo:text-align="left" fo:margin-top="7.00pt" fo:margin-bottom="6.00pt"/>
    </style:style>
    <style:style style:name="P55" style:family="paragraph">
      <style:paragraph-properties fo:line-height="115.00%" fo:text-align="left" fo:margin-bottom="7.00pt"/>
    </style:style>
    <style:style style:name="P56" style:family="paragraph">
      <style:paragraph-properties fo:line-height="100.00%" fo:text-align="left" fo:margin-top="7.00pt" fo:margin-bottom="6.00pt"/>
    </style:style>
    <text:list-style style:name="L57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57" style:family="paragraph">
      <style:paragraph-properties fo:line-height="115.00%" fo:text-align="left"/>
    </style:style>
    <style:style style:name="P58" style:family="paragraph">
      <style:paragraph-properties fo:line-height="115.00%" fo:text-align="left" fo:margin-bottom="7.00pt"/>
    </style:style>
    <style:style style:name="P59" style:family="paragraph">
      <style:paragraph-properties fo:line-height="100.00%" fo:text-align="left" fo:margin-bottom="14.15pt"/>
    </style:style>
    <style:style style:name="P60" style:family="paragraph">
      <style:paragraph-properties fo:line-height="100.00%" fo:text-align="left" fo:margin-top="7.00pt" fo:margin-bottom="6.00pt"/>
    </style:style>
    <style:style style:name="P61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64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1.40pt" fo:text-indent="-1.40pt">
        <style:tab-stops>
          <style:tab-stop style:position="40.60pt" style:type="center"/>
          <style:tab-stop style:position="3288.25pt" style:type="center"/>
          <style:tab-stop style:position="421120.25pt" style:type="right"/>
        </style:tab-stops>
      </style:paragraph-properties>
    </style:style>
    <style:style style:name="P75" style:family="paragraph">
      <style:paragraph-properties fo:line-height="115.00%" fo:text-align="left" fo:margin-bottom="7.00pt"/>
    </style:style>
    <style:style style:name="P76" style:family="paragraph">
      <style:paragraph-properties fo:line-height="115.00%" fo:text-align="justify" fo:margin-bottom="7.00pt"/>
    </style:style>
    <style:style style:name="TableColumn0100" style:family="table-column">
      <style:table-column-properties style:column-width="0.583333in"/>
    </style:style>
    <style:style style:name="TableColumn0101" style:family="table-column">
      <style:table-column-properties style:column-width="1.205556in"/>
    </style:style>
    <style:style style:name="TableColumn0102" style:family="table-column">
      <style:table-column-properties style:column-width="2.777778in"/>
    </style:style>
    <style:style style:name="Table01" style:family="table">
      <style:table-properties style:width="4.566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</office:automatic-styles>
  <office:body>
    <office:text>
      <text:p text:style-name="P1"><text:span text:style-name="T1">Romans 4 Series</text:span></text:p>
      <text:p text:style-name="P2"><text:span text:style-name="T2">Tema ng Chapter:</text:span></text:p>
      <text:p text:style-name="P3"><text:span text:style-name="T3">Justified by Faith: Ang Halimbawa ni Abraham</text:span></text:p>
      <text:p text:style-name="P4"><text:span text:style-name="T4"/></text:p>
      <text:p text:style-name="P5"><text:span text:style-name="T5">Week 1: Romans 4:1</text:span><text:span text:style-name="T6">–</text:span><text:span text:style-name="T7">8<text:s/></text:span><text:span text:style-name="T8">—</text:span><text:span text:style-name="T9"><text:s/>Abraham Was Justified by Faith</text:span></text:p>
      <text:p text:style-name="P6"><text:span text:style-name="T10">Focus:</text:span></text:p>
      <text:p text:style-name="P7"><text:span text:style-name="T11">Si Abraham ay itinuring na matuwid dahil sa pananampalataya, hindi dahil sa kanyang mga gawa.</text:span></text:p>
      <text:p text:style-name="P8"><text:span text:style-name="T12">Key Idea:</text:span></text:p>
      <text:p text:style-name="P9"><text:span text:style-name="T13">Ang kaligtasan ay regalo ng biyaya, hindi sahod ng mabubuting gawa.</text:span></text:p>
      <text:p text:style-name="P10"><text:span text:style-name="T14">Application:</text:span></text:p>
      <text:p text:style-name="P11"><text:span text:style-name="T15">Matuto na magtiwala sa ginawa ng Diyos kaysa umasa sa sariling kakayahan.</text:span></text:p>
      <text:p text:style-name="P12"><text:span text:style-name="T16">Posibleng 6-Day Breakdown:</text:span></text:p>
      <text:list text:style-name="L13">
        <text:list-item>
          <text:p text:style-name="P13"><text:span text:style-name="T17">Day 1<text:s/></text:span><text:span text:style-name="T18">—</text:span><text:span text:style-name="T19"><text:s/>Romans 4:1 </text:span></text:p>
        </text:list-item>
        <text:list-item>
          <text:p text:style-name="P13"><text:span text:style-name="T20">Day 2<text:s/></text:span><text:span text:style-name="T21">—</text:span><text:span text:style-name="T22"><text:s/>Romans 4:2 </text:span></text:p>
        </text:list-item>
        <text:list-item>
          <text:p text:style-name="P13"><text:span text:style-name="T23">Day 3<text:s/></text:span><text:span text:style-name="T24">—</text:span><text:span text:style-name="T25"><text:s/>Romans 4:3 </text:span></text:p>
        </text:list-item>
        <text:list-item>
          <text:p text:style-name="P13"><text:span text:style-name="T26">Day 4<text:s/></text:span><text:span text:style-name="T27">—</text:span><text:span text:style-name="T28"><text:s/>Romans 4:4 </text:span></text:p>
        </text:list-item>
        <text:list-item>
          <text:p text:style-name="P13"><text:span text:style-name="T29">Day 5<text:s/></text:span><text:span text:style-name="T30">—</text:span><text:span text:style-name="T31"><text:s/>Romans 4:5 </text:span></text:p>
        </text:list-item>
        <text:list-item>
          <text:p text:style-name="P14"><text:span text:style-name="T32">Day 6<text:s/></text:span><text:span text:style-name="T33">—</text:span><text:span text:style-name="T34"><text:s/>Romans 4:6</text:span><text:span text:style-name="T35">–</text:span><text:span text:style-name="T36">8 </text:span></text:p>
        </text:list-item>
      </text:list>
      <text:p text:style-name="P15"><text:span text:style-name="T37"/></text:p>
      <text:p text:style-name="P16"><text:span text:style-name="T38">Week 2: Romans 4:9</text:span><text:span text:style-name="T39">–</text:span><text:span text:style-name="T40">12<text:s/></text:span><text:span text:style-name="T41">—</text:span><text:span text:style-name="T42"><text:s/>Faith Before Circumcision</text:span></text:p>
      <text:p text:style-name="P17"><text:span text:style-name="T43">Focus:</text:span></text:p>
      <text:p text:style-name="P18"><text:span text:style-name="T44">Tinanggap ng Diyos si Abraham bago pa siya tuliin.</text:span></text:p>
      <text:p text:style-name="P19"><text:span text:style-name="T45">Key Idea:</text:span></text:p>
      <text:p text:style-name="P20"><text:span text:style-name="T46">Ang pananampalataya ang batayan ng pagtanggap ng Diyos, hindi relihiyosong ritwal.</text:span></text:p>
      <text:p text:style-name="P21"><text:span text:style-name="T47">Application:</text:span></text:p>
      <text:p text:style-name="P22"><text:span text:style-name="T48">Huwag umasa sa mga panlabas na gawain bilang sukatan ng relasyon sa Diyos.</text:span></text:p>
      <text:p text:style-name="P23"><text:span text:style-name="T49">Posibleng 6-Day Breakdown:</text:span></text:p>
      <text:list text:style-name="L24">
        <text:list-item>
          <text:p text:style-name="P24"><text:span text:style-name="T50">Day 1<text:s/></text:span><text:span text:style-name="T51">—</text:span><text:span text:style-name="T52"><text:s/>Romans 4:9 </text:span></text:p>
        </text:list-item>
        <text:list-item>
          <text:p text:style-name="P24"><text:span text:style-name="T53">Day 2<text:s/></text:span><text:span text:style-name="T54">—</text:span><text:span text:style-name="T55"><text:s/>Romans 4:10 </text:span></text:p>
        </text:list-item>
        <text:list-item>
          <text:p text:style-name="P24"><text:span text:style-name="T56">Day 3<text:s/></text:span><text:span text:style-name="T57">—</text:span><text:span text:style-name="T58"><text:s/>Romans 4:11a </text:span></text:p>
        </text:list-item>
        <text:list-item>
          <text:p text:style-name="P24"><text:span text:style-name="T59">Day 4<text:s/></text:span><text:span text:style-name="T60">—</text:span><text:span text:style-name="T61"><text:s/>Romans 4:11b </text:span></text:p>
        </text:list-item>
        <text:list-item>
          <text:p text:style-name="P24"><text:span text:style-name="T62">Day 5<text:s/></text:span><text:span text:style-name="T63">—</text:span><text:span text:style-name="T64"><text:s/>Romans 4:12 </text:span></text:p>
        </text:list-item>
        <text:list-item>
          <text:p text:style-name="P25"><text:span text:style-name="T65">Day 6<text:s/></text:span><text:span text:style-name="T66">—</text:span><text:span text:style-name="T67"><text:s/>Review and Reflection </text:span></text:p>
        </text:list-item>
      </text:list>
      <text:p text:style-name="P26"><text:span text:style-name="T68"/></text:p>
      <text:p text:style-name="P27"><text:span text:style-name="T69">Week 3: Romans 4:13</text:span><text:span text:style-name="T70">–</text:span><text:span text:style-name="T71">17<text:s/></text:span><text:span text:style-name="T72">—</text:span><text:span text:style-name="T73"><text:s/>The Promise Comes Through Faith</text:span></text:p>
      <text:p text:style-name="P28"><text:span text:style-name="T74">Focus:</text:span></text:p>
      <text:p text:style-name="P29"><text:span text:style-name="T75">Ang pangako ng Diyos ay natatanggap sa pamamagitan ng pananampalataya, hindi ng kautusan.</text:span></text:p>
      <text:p text:style-name="P30"><text:span text:style-name="T76">Key Idea:</text:span></text:p>
      <text:p text:style-name="P31"><text:span text:style-name="T77">Ang biyaya at pananampalataya ang daan upang matanggap ang mga pangako ng Diyos.</text:span></text:p>
      <text:p text:style-name="P32"><text:span text:style-name="T78">Application:</text:span></text:p>
      <text:p text:style-name="P33"><text:span text:style-name="T79">Magtiwala sa mga pangako ng Diyos kahit hindi pa nakikita ang katuparan.</text:span></text:p>
      <text:p text:style-name="P34"><text:span text:style-name="T80">Posibleng 6-Day Breakdown:</text:span></text:p>
      <text:list text:style-name="L35">
        <text:list-item>
          <text:p text:style-name="P35"><text:span text:style-name="T81">Day 1<text:s/></text:span><text:span text:style-name="T82">—</text:span><text:span text:style-name="T83"><text:s/>Romans 4:13 </text:span></text:p>
        </text:list-item>
        <text:list-item>
          <text:p text:style-name="P35"><text:span text:style-name="T84">Day 2<text:s/></text:span><text:span text:style-name="T85">—</text:span><text:span text:style-name="T86"><text:s/>Romans 4:14 </text:span></text:p>
        </text:list-item>
        <text:list-item>
          <text:p text:style-name="P35"><text:span text:style-name="T87">Day 3<text:s/></text:span><text:span text:style-name="T88">—</text:span><text:span text:style-name="T89"><text:s/>Romans 4:15 </text:span></text:p>
        </text:list-item>
        <text:list-item>
          <text:p text:style-name="P35"><text:span text:style-name="T90">Day 4<text:s/></text:span><text:span text:style-name="T91">—</text:span><text:span text:style-name="T92"><text:s/>Romans 4:16 </text:span></text:p>
        </text:list-item>
        <text:list-item>
          <text:p text:style-name="P35"><text:span text:style-name="T93">Day 5<text:s/></text:span><text:span text:style-name="T94">—</text:span><text:span text:style-name="T95"><text:s/>Romans 4:17 </text:span></text:p>
        </text:list-item>
        <text:list-item>
          <text:p text:style-name="P36"><text:span text:style-name="T96">Day 6<text:s/></text:span><text:span text:style-name="T97">—</text:span><text:span text:style-name="T98"><text:s/>Reflection on God's Promises </text:span></text:p>
        </text:list-item>
      </text:list>
      <text:p text:style-name="P37"><text:span text:style-name="T99"/></text:p>
      <text:p text:style-name="P38"><text:span text:style-name="T100">Week 4: Romans 4:18</text:span><text:span text:style-name="T101">–</text:span><text:span text:style-name="T102">22<text:s/></text:span><text:span text:style-name="T103">—</text:span><text:span text:style-name="T104"><text:s/>Abraham's Unwavering Faith</text:span></text:p>
      <text:p text:style-name="P39"><text:span text:style-name="T105">Focus:</text:span></text:p>
      <text:p text:style-name="P40"><text:span text:style-name="T106">Nanatiling nanampalataya si Abraham kahit tila imposible ang sitwasyon.</text:span></text:p>
      <text:p text:style-name="P41"><text:span text:style-name="T107">Key Idea:</text:span></text:p>
      <text:p text:style-name="P42"><text:span text:style-name="T108">Ang tunay na pananampalataya ay nagtitiwala sa kapangyarihan ng Diyos kaysa sa nakikita ng mata.</text:span></text:p>
      <text:p text:style-name="P43"><text:span text:style-name="T109">Application:</text:span></text:p>
      <text:p text:style-name="P44"><text:span text:style-name="T110">Magtiwala sa Diyos kahit mahirap at tila imposible ang iyong kalagayan.</text:span></text:p>
      <text:p text:style-name="P45"><text:span text:style-name="T111">Posibleng 6-Day Breakdown:</text:span></text:p>
      <text:list text:style-name="L46">
        <text:list-item>
          <text:p text:style-name="P46"><text:span text:style-name="T112">Day 1<text:s/></text:span><text:span text:style-name="T113">—</text:span><text:span text:style-name="T114"><text:s/>Romans 4:18 </text:span></text:p>
        </text:list-item>
        <text:list-item>
          <text:p text:style-name="P46"><text:span text:style-name="T115">Day 2<text:s/></text:span><text:span text:style-name="T116">—</text:span><text:span text:style-name="T117"><text:s/>Romans 4:19 </text:span></text:p>
        </text:list-item>
        <text:list-item>
          <text:p text:style-name="P46"><text:span text:style-name="T118">Day 3<text:s/></text:span><text:span text:style-name="T119">—</text:span><text:span text:style-name="T120"><text:s/>Romans 4:20 </text:span></text:p>
        </text:list-item>
        <text:list-item>
          <text:p text:style-name="P46"><text:span text:style-name="T121">Day 4<text:s/></text:span><text:span text:style-name="T122">—</text:span><text:span text:style-name="T123"><text:s/>Romans 4:21 </text:span></text:p>
        </text:list-item>
        <text:list-item>
          <text:p text:style-name="P46"><text:span text:style-name="T124">Day 5<text:s/></text:span><text:span text:style-name="T125">—</text:span><text:span text:style-name="T126"><text:s/>Romans 4:22 </text:span></text:p>
        </text:list-item>
        <text:list-item>
          <text:p text:style-name="P47"><text:span text:style-name="T127">Day 6<text:s/></text:span><text:span text:style-name="T128">—</text:span><text:span text:style-name="T129"><text:s/>Reflection on Trusting God </text:span></text:p>
        </text:list-item>
      </text:list>
      <text:p text:style-name="P48"><text:span text:style-name="T130"/></text:p>
      <text:p text:style-name="P49"><text:span text:style-name="T131">Week 5: Romans 4:23</text:span><text:span text:style-name="T132">–</text:span><text:span text:style-name="T133">25<text:s/></text:span><text:span text:style-name="T134">—</text:span><text:span text:style-name="T135"><text:s/>Faith for All Believers</text:span></text:p>
      <text:p text:style-name="P50"><text:span text:style-name="T136">Focus:</text:span></text:p>
      <text:p text:style-name="P51"><text:span text:style-name="T137">Ang karanasan ni Abraham ay halimbawa para sa lahat ng mananampalataya.</text:span></text:p>
      <text:p text:style-name="P52"><text:span text:style-name="T138">Key Idea:</text:span></text:p>
      <text:p text:style-name="P53"><text:span text:style-name="T139">Ang parehong pananampalatayang nagligtas kay Abraham ay siya ring pananampalatayang nagliligtas sa atin kay Cristo.</text:span></text:p>
      <text:p text:style-name="P54"><text:span text:style-name="T140">Application:</text:span></text:p>
      <text:p text:style-name="P55"><text:span text:style-name="T141">Isentro ang iyong pananampalataya kay Jesus at sa Kanyang natapos na gawain.</text:span></text:p>
      <text:p text:style-name="P56"><text:span text:style-name="T142">Posibleng 6-Day Breakdown:</text:span></text:p>
      <text:list text:style-name="L57">
        <text:list-item>
          <text:p text:style-name="P57"><text:span text:style-name="T143">Day 1<text:s/></text:span><text:span text:style-name="T144">—</text:span><text:span text:style-name="T145"><text:s/>Romans 4:23 </text:span></text:p>
        </text:list-item>
        <text:list-item>
          <text:p text:style-name="P57"><text:span text:style-name="T146">Day 2<text:s/></text:span><text:span text:style-name="T147">—</text:span><text:span text:style-name="T148"><text:s/>Romans 4:24a </text:span></text:p>
        </text:list-item>
        <text:list-item>
          <text:p text:style-name="P57"><text:span text:style-name="T149">Day 3<text:s/></text:span><text:span text:style-name="T150">—</text:span><text:span text:style-name="T151"><text:s/>Romans 4:24b </text:span></text:p>
        </text:list-item>
        <text:list-item>
          <text:p text:style-name="P57"><text:span text:style-name="T152">Day 4<text:s/></text:span><text:span text:style-name="T153">—</text:span><text:span text:style-name="T154"><text:s/>Romans 4:25a </text:span></text:p>
        </text:list-item>
        <text:list-item>
          <text:p text:style-name="P57"><text:span text:style-name="T155">Day 5<text:s/></text:span><text:span text:style-name="T156">—</text:span><text:span text:style-name="T157"><text:s/>Romans 4:25b </text:span></text:p>
        </text:list-item>
        <text:list-item>
          <text:p text:style-name="P58"><text:span text:style-name="T158">Day 6<text:s/></text:span><text:span text:style-name="T159">—</text:span><text:span text:style-name="T160"><text:s/>Chapter Summary and Personal Response </text:span></text:p>
        </text:list-item>
      </text:list>
      <text:p text:style-name="P59"><text:span text:style-name="T161"/></text:p>
      <text:p text:style-name="P60"><text:span text:style-name="T162">Buod ng Romans 4 Serie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62"><text:span text:style-name="T164">Week</text:span><text:span text:style-name="T165"/></text:p>
          </table:table-cell>
          <table:table-cell table:style-name="TableCell010001">
            <text:p text:style-name="P62"><text:span text:style-name="T166">Passage</text:span><text:span text:style-name="T167"/></text:p>
          </table:table-cell>
          <table:table-cell table:style-name="TableCell010002">
            <text:p text:style-name="P62"><text:span text:style-name="T168">Focus</text:span><text:span text:style-name="T169"/></text:p>
          </table:table-cell>
        </table:table-row>
        <table:table-row table:style-name="TableRow0101">
          <table:table-cell table:style-name="TableCell010100">
            <text:p text:style-name="P65"><text:span text:style-name="T170">Week 1</text:span><text:span text:style-name="T171"/></text:p>
          </table:table-cell>
          <table:table-cell table:style-name="TableCell010101">
            <text:p text:style-name="P65"><text:span text:style-name="T172">Romans 4:1</text:span><text:span text:style-name="T173">–</text:span><text:span text:style-name="T174">8</text:span><text:span text:style-name="T175"/></text:p>
          </table:table-cell>
          <table:table-cell table:style-name="TableCell010102">
            <text:p text:style-name="P65"><text:span text:style-name="T176">Justified by Faith, Not Works</text:span><text:span text:style-name="T177"/></text:p>
          </table:table-cell>
        </table:table-row>
        <table:table-row table:style-name="TableRow0102">
          <table:table-cell table:style-name="TableCell010200">
            <text:p text:style-name="P67"><text:span text:style-name="T178">Week 2</text:span><text:span text:style-name="T179"/></text:p>
          </table:table-cell>
          <table:table-cell table:style-name="TableCell010201">
            <text:p text:style-name="P67"><text:span text:style-name="T180">Romans 4:9</text:span><text:span text:style-name="T181">–</text:span><text:span text:style-name="T182">12</text:span><text:span text:style-name="T183"/></text:p>
          </table:table-cell>
          <table:table-cell table:style-name="TableCell010202">
            <text:p text:style-name="P67"><text:span text:style-name="T184">Faith Before Religious Rituals</text:span><text:span text:style-name="T185"/></text:p>
          </table:table-cell>
        </table:table-row>
        <table:table-row table:style-name="TableRow0103">
          <table:table-cell table:style-name="TableCell010300">
            <text:p text:style-name="P69"><text:span text:style-name="T186">Week 3</text:span><text:span text:style-name="T187"/></text:p>
          </table:table-cell>
          <table:table-cell table:style-name="TableCell010301">
            <text:p text:style-name="P69"><text:span text:style-name="T188">Romans 4:13</text:span><text:span text:style-name="T189">–</text:span><text:span text:style-name="T190">17</text:span><text:span text:style-name="T191"/></text:p>
          </table:table-cell>
          <table:table-cell table:style-name="TableCell010302">
            <text:p text:style-name="P69"><text:span text:style-name="T192">God's Promise Through Faith</text:span><text:span text:style-name="T193"/></text:p>
          </table:table-cell>
        </table:table-row>
        <table:table-row table:style-name="TableRow0104">
          <table:table-cell table:style-name="TableCell010400">
            <text:p text:style-name="P71"><text:span text:style-name="T194">Week 4</text:span><text:span text:style-name="T195"/></text:p>
          </table:table-cell>
          <table:table-cell table:style-name="TableCell010401">
            <text:p text:style-name="P71"><text:span text:style-name="T196">Romans 4:18</text:span><text:span text:style-name="T197">–</text:span><text:span text:style-name="T198">22</text:span><text:span text:style-name="T199"/></text:p>
          </table:table-cell>
          <table:table-cell table:style-name="TableCell010402">
            <text:p text:style-name="P71"><text:span text:style-name="T200">Trusting God Against All Odds</text:span><text:span text:style-name="T201"/></text:p>
          </table:table-cell>
        </table:table-row>
        <table:table-row table:style-name="TableRow0105">
          <table:table-cell table:style-name="TableCell010500">
            <text:p text:style-name="P73"><text:span text:style-name="T202">Week 5</text:span><text:span text:style-name="T203"/></text:p>
          </table:table-cell>
          <table:table-cell table:style-name="TableCell010501">
            <text:p text:style-name="P73"><text:span text:style-name="T204">Romans 4:23</text:span><text:span text:style-name="T205">–</text:span><text:span text:style-name="T206">25</text:span><text:span text:style-name="T207"/></text:p>
          </table:table-cell>
          <table:table-cell table:style-name="TableCell010502">
            <text:p text:style-name="P73"><text:span text:style-name="T208">Abraham's Faith and Our Faith in Christ</text:span><text:span text:style-name="T209"/></text:p>
          </table:table-cell>
        </table:table-row>
      </table:table>
      <text:p text:style-name="P75"><text:span text:style-name="T210">Magandang progression ito dahil mula sa<text:s/></text:span><text:span text:style-name="T211">"faith not works"<text:s/></text:span><text:span text:style-name="T212">→</text:span><text:span text:style-name="T213"><text:s/>"faith not rituals"<text:s/></text:span><text:span text:style-name="T214">→</text:span><text:span text:style-name="T215"><text:s/>"faith receives God's promises"<text:s/></text:span><text:span text:style-name="T216">→</text:span><text:span text:style-name="T217"><text:s/>"faith trusts God's power"<text:s/></text:span><text:span text:style-name="T218">→</text:span><text:span text:style-name="T219"><text:s/>"faith in Christ saves us today."</text:span><text:span text:style-name="T220"><text:s/>Ito rin ang natural na argumento ni Pablo sa buong Romans 4.</text:span></text:p>
      <text:p text:style-name="P76"><text:span text:style-name="T2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